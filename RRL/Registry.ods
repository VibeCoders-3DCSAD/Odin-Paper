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1.4193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Paper ID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Venue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10.62986/dp2024.10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lbert, J. R. G.; Briones, R. M.; Rivera, J. P. R.</text:p>
          </table:table-cell>
          <table:table-cell office:value-type="string" calcext:value-type="string">
            <text:p>Wealth Creation for Expanding the Middle Class in the Philippines</text:p>
          </table:table-cell>
          <table:table-cell office:value-type="string" calcext:value-type="string">
            <text:p>Philippine Institute for Development Studies Discussion Paper Seri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69569/ijp.2026.065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-una, A.</text:p>
          </table:table-cell>
          <table:table-cell office:value-type="string" calcext:value-type="string">
            <text:p>Beyond Awareness: Examining Financial Behaviors Among Public School Teachers in the Philippines</text:p>
          </table:table-cell>
          <table:table-cell office:value-type="string" calcext:value-type="string">
            <text:p>Journal of Interdisciplinary Perspectiv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20944/preprints202508.0349.v1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ma, N. A.</text:p>
          </table:table-cell>
          <table:table-cell office:value-type="string" calcext:value-type="string">
            <text:p>Analysis of the Food and Income Expenditure Survey 2023 Among Filipino Households</text:p>
          </table:table-cell>
          <table:table-cell office:value-type="string" calcext:value-type="string">
            <text:p>Preprints.org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63498/ijabms2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ando, M. A. A.</text:p>
          </table:table-cell>
          <table:table-cell office:value-type="string" calcext:value-type="string">
            <text:p>The plight of teachers on the twice-a-month salary release: Financial literacy and survival</text:p>
          </table:table-cell>
          <table:table-cell office:value-type="string" calcext:value-type="string">
            <text:p>International Journal of Accountancy, Business, and Management Studies (IJABMS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2b3c4d5-e6f7-4a8b-9c0d-1e2f3a4b5c6d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pao, A. A.; Cayanpat, R. A. B.; Edullantes, Y. P. Jr.; Cabanero, K. E. S.; Hechanova, J. M. T.; Candia, H. G.</text:p>
          </table:table-cell>
          <table:table-cell office:value-type="string" calcext:value-type="string">
            <text:p>Martime Students' Financial Knowledge, Attitude, and Behavior</text:p>
          </table:table-cell>
          <table:table-cell office:value-type="string" calcext:value-type="string">
            <text:p>Daengku: Journal of Humanities and Social Sciences Innovation</text:p>
          </table:table-cell>
          <table:table-cell table:number-columns-repeated="3"/>
        </table:table-row>
        <table:table-row table:style-name="ro1" table:number-rows-repeated="104856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3:29:08.378629300</meta:creation-date>
    <dc:date>2026-05-01T21:09:36.200111100</dc:date>
    <meta:editing-duration>PT2M57S</meta:editing-duration>
    <meta:editing-cycles>2</meta:editing-cycles>
    <meta:generator>LibreOffice/25.8.5.2$Windows_X86_64 LibreOffice_project/9c8b85f387cc00a89945a79c9e6239f32e450ac2</meta:generator>
    <meta:document-statistic meta:table-count="1" meta:cell-count="39" meta:object-count="0"/>
  </office:meta>
</office:document-meta>
</file>