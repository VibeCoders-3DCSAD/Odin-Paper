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ro6" style:family="table-row">
      <style:table-row-properties style:row-height="0.7874in" fo:break-before="auto" style:use-optimal-row-height="true"/>
    </style:style>
    <style:style style:name="ro7" style:family="table-row">
      <style:table-row-properties style:row-height="0.6354in" fo:break-before="auto" style:use-optimal-row-height="true"/>
    </style:style>
    <style:style style:name="ro8" style:family="table-row">
      <style:table-row-properties style:row-height="0.4835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Paper ID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Venue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>
            <text:p>f8c3de3d-1fea-4d7c-a8b0-29f63c4c3454</text:p>
          </table:table-cell>
          <table:table-cell table:style-name="ce3" office:value-type="string" calcext:value-type="string">
            <text:p>International</text:p>
          </table:table-cell>
          <table:table-cell table:style-name="ce3" office:value-type="float" office:value="2025" calcext:value-type="float">
            <text:p>2025</text:p>
          </table:table-cell>
          <table:table-cell table:style-name="ce3" office:value-type="string" calcext:value-type="string">
            <text:p>Akinyemi, A.</text:p>
          </table:table-cell>
          <table:table-cell table:style-name="ce3" office:value-type="string" calcext:value-type="string">
            <text:p>The Role of Financial Literacy in Reducing the Wealth Gap: The Effectiveness of Financial Coaching in Low-Income Communities (A Case Study of the US and Europe)</text:p>
          </table:table-cell>
          <table:table-cell table:style-name="ce3" office:value-type="string" calcext:value-type="string">
            <text:p>Contemporary Journal of Social Science Review</text:p>
          </table:table-cell>
          <table:table-cell table:style-name="ce3" table:number-columns-repeated="3"/>
        </table:table-row>
        <table:table-row table:style-name="ro3">
          <table:table-cell office:value-type="string" calcext:value-type="string">
            <text:p>10.62986/dp2024.10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lbert, J. R. G.; Briones, R. M.; Rivera, J. P. R.</text:p>
          </table:table-cell>
          <table:table-cell office:value-type="string" calcext:value-type="string">
            <text:p>Wealth Creation for Expanding the Middle Class in the Philippines</text:p>
          </table:table-cell>
          <table:table-cell office:value-type="string" calcext:value-type="string">
            <text:p>Philippine Institute for Development Studies Discussion Paper Ser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55248/gengpi.6.0325.11142</text:p>
          </table:table-cell>
          <table:table-cell office:value-type="string" calcext:value-type="string">
            <text:p>Internation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lvarina, C. C.; Handumon, H. O.; Peralta, J. M. B.; Paguia, M. A.; Alfanta, M. P.</text:p>
          </table:table-cell>
          <table:table-cell office:value-type="string" calcext:value-type="string">
            <text:p>Budgeting Practices Among Below Minimum Wage Earners: A Case Study of Sales Personnel of Local Enterprises in Pagadian City</text:p>
          </table:table-cell>
          <table:table-cell office:value-type="string" calcext:value-type="string">
            <text:p>International Journal of Research Publication and Review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69569/ijp.2026.065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-una, A.</text:p>
          </table:table-cell>
          <table:table-cell office:value-type="string" calcext:value-type="string">
            <text:p>Beyond Awareness: Examining Financial Behaviors Among Public School Teachers in the Philippines</text:p>
          </table:table-cell>
          <table:table-cell office:value-type="string" calcext:value-type="string">
            <text:p>Journal of Interdisciplinary Perspectiv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20944/preprints202508.0349.v1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ma, N. A.</text:p>
          </table:table-cell>
          <table:table-cell office:value-type="string" calcext:value-type="string">
            <text:p>Analysis of the Food and Income Expenditure Survey 2023 Among Filipino Households</text:p>
          </table:table-cell>
          <table:table-cell office:value-type="string" calcext:value-type="string">
            <text:p>Preprints.org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63498/ijabms2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ando, M. A. A.</text:p>
          </table:table-cell>
          <table:table-cell office:value-type="string" calcext:value-type="string">
            <text:p>The plight of teachers on the twice-a-month salary release: Financial literacy and survival</text:p>
          </table:table-cell>
          <table:table-cell office:value-type="string" calcext:value-type="string">
            <text:p>International Journal of Accountancy, Business, and Management Studies (IJABMS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1080/1369183X.2025.2542769</text:p>
          </table:table-cell>
          <table:table-cell office:value-type="string" calcext:value-type="string">
            <text:p>Internation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rith, M.</text:p>
          </table:table-cell>
          <table:table-cell office:value-type="string" calcext:value-type="string">
            <text:p>Reimagining social protection: financialised futures among ageing migrant domestic workers in Asia</text:p>
          </table:table-cell>
          <table:table-cell office:value-type="string" calcext:value-type="string">
            <text:p>Journal of Ethnic and Migration Stud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3390/ijfs14020035</text:p>
          </table:table-cell>
          <table:table-cell office:value-type="string" calcext:value-type="string">
            <text:p>Internation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oun, D.; R., R.; Sfeir, L.; Al Maalouf, N. J.</text:p>
          </table:table-cell>
          <table:table-cell office:value-type="string" calcext:value-type="string">
            <text:p>Financial Literacy, FinTech Adoption, and Financial Attitudes: Shaping Economic Decision-Making among Millennials in Lebanon</text:p>
          </table:table-cell>
          <table:table-cell office:value-type="string" calcext:value-type="string">
            <text:p>International Journal of Financial Stud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35877/454RI.daengku4034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pao, A. A.; Cayanpat, R. A. B.; Edullantes, Y. P. Jr.; Cabanero, K. E. S.; Hechanova, J. M. T.; Candia, H. G.</text:p>
          </table:table-cell>
          <table:table-cell office:value-type="string" calcext:value-type="string">
            <text:p>Martime Students' Financial Knowledge, Attitude, and Behavior</text:p>
          </table:table-cell>
          <table:table-cell office:value-type="string" calcext:value-type="string">
            <text:p>Daengku: Journal of Humanities and Social Sciences Innova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35974/isc.v11i4.3599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aya, K. O.; Piquero, J. R. M.; Romero, C. J. P.; Sales, Y. L. M.; Suñga, P. A. N.; Ibañez, M. M.; Ramos, R. I. A.; Asi, G. M.</text:p>
          </table:table-cell>
          <table:table-cell office:value-type="string" calcext:value-type="string">
            <text:p>Peer Influence and Adolescent Spending: Insights into High School Students' Buying Behavior</text:p>
          </table:table-cell>
          <table:table-cell office:value-type="string" calcext:value-type="string">
            <text:p>11th International Scholar's Conference (ISC 2024), Universitas Advent Indonesia, Indonesia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10.55955/330001</text:p>
          </table:table-cell>
          <table:table-cell office:value-type="string" calcext:value-type="string">
            <text:p>Internation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taza, C.; Porcel, M.; Resabal, L.; Sandoval, A.; Bragas, C.</text:p>
          </table:table-cell>
          <table:table-cell office:value-type="string" calcext:value-type="string">
            <text:p>THE IMPACT OF PSYCHOLOGICAL, ECONOMIC, SOCIAL ASPECTS, AND INTEREST RATE VARIATIONS ON WORKING MILLENNIALS' SAVING PATTERNS THROUGH DIGITAL BANKING</text:p>
          </table:table-cell>
          <table:table-cell office:value-type="string" calcext:value-type="string">
            <text:p>Sachetas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10.1371/journal.pone.0294466</text:p>
          </table:table-cell>
          <table:table-cell office:value-type="string" calcext:value-type="string">
            <text:p>Internationa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ai, R.</text:p>
          </table:table-cell>
          <table:table-cell office:value-type="string" calcext:value-type="string">
            <text:p>Impact of Financial Literacy, Mental Budgeting, and Self-Control on Financial Well-Being with the Mediating Role of Investment Decision Making</text:p>
          </table:table-cell>
          <table:table-cell office:value-type="string" calcext:value-type="string">
            <text:p>PLoS ON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f7d9e3a2-5b1c-4e8a-9d2f-6b4e8c7a3d1f</text:p>
          </table:table-cell>
          <table:table-cell office:value-type="string" calcext:value-type="string">
            <text:p>Loca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angko Sentral ng Pilipinas</text:p>
          </table:table-cell>
          <table:table-cell office:value-type="string" calcext:value-type="string">
            <text:p>2021 Consumer Finance Survey (CFS)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f47ac10b-58cc-4372-a567-0e02b2c3d479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Bangko Sentral ng Pilipinas</text:p>
          </table:table-cell>
          <table:table-cell office:value-type="string" calcext:value-type="string">
            <text:p>Consumer Confidence Improves in Q1 2026, Less Upbeat for the Year Ahead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1016/j.latcb.2025.100196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ayangos, V. B.; Lubangco, C. K.</text:p>
          </table:table-cell>
          <table:table-cell office:value-type="string" calcext:value-type="string">
            <text:p>Do Remittances Boost Household Spending: New Evidence from Migrants' Household Survey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2139/ssrn.5678282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Bongado, B. B.; Magallanes, A. R.; Semana, C. M.</text:p>
          </table:table-cell>
          <table:table-cell office:value-type="string" calcext:value-type="string">
            <text:p>INFLUENCE OF DIGITAL WALLETS ON THE FINANCIAL BEHAVIOR OF HEIS STUDENTS</text:p>
          </table:table-cell>
          <table:table-cell office:value-type="string" calcext:value-type="string">
            <text:p>SSRN Electronic Journal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10.11594/ijmaber.05.08.32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ongalonta, M. B.; Bongalonta, M. M.; Gigantoca, S. E.</text:p>
          </table:table-cell>
          <table:table-cell office:value-type="string" calcext:value-type="string">
            <text:p>The Traditional Way of Saving Money Versus the Modern Style of Investment: The Financial Management Styles of Sorsogon State University (Sorsu) Bulan Campus Faculty Members</text:p>
          </table:table-cell>
          <table:table-cell office:value-type="string" calcext:value-type="string">
            <text:p>International Journal of Multidisciplinary Applied Business and Education Research (IJMABER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53f2d4a7-1b3c-4e8e-9a2d-6c3b8e4f7a1d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biles, S. L.</text:p>
          </table:table-cell>
          <table:table-cell office:value-type="string" calcext:value-type="string">
            <text:p>Financial Management Practices of Employees at Bureau Of Internal Revenue</text:p>
          </table:table-cell>
          <table:table-cell office:value-type="string" calcext:value-type="string">
            <text:p>United International Journal for Research &amp; Technolog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f8c3e5a2-7b1d-4e9c-8a3f-2d6e9b1c4a7d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acnio, F. Q.; Romarate, M. E. G.</text:p>
          </table:table-cell>
          <table:table-cell office:value-type="string" calcext:value-type="string">
            <text:p>How does financial literacy affect financial behavior over the life cycle? Evidence from Filipino households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46303/tpied.2024.12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asilan, J. J.; Baclagan, T.</text:p>
          </table:table-cell>
          <table:table-cell office:value-type="string" calcext:value-type="string">
            <text:p>Exploring Parental Expectations on Children Helping Parents out in Lower Middle-Income Families</text:p>
          </table:table-cell>
          <table:table-cell office:value-type="string" calcext:value-type="string">
            <text:p>Theory and Practice in Child Developmen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58557/(ijeh).v5i2.311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sino, R. M. Z.; Serrano, L. L.; Granada, M. I. D.</text:p>
          </table:table-cell>
          <table:table-cell office:value-type="string" calcext:value-type="string">
            <text:p>Revisiting the Filipino Value Utang na Loob: Contextual Perceptions, Implications and Inputs to Sustaining the Filipino Psychology Discussions</text:p>
          </table:table-cell>
          <table:table-cell office:value-type="string" calcext:value-type="string">
            <text:p>International Journal of Education and Humanit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61424/rjbe.v3i3.569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ervantes, J. Z.; Custora, J. M. G.; Duguran, J. C. C.; Malacaya, A. S.; Mendoza, J.; Panga, R. B.; Waminal, E. D.</text:p>
          </table:table-cell>
          <table:table-cell office:value-type="string" calcext:value-type="string">
            <text:p>The Effect of Online Buying Decision on Personal Budget of Business Administration Students</text:p>
          </table:table-cell>
          <table:table-cell office:value-type="string" calcext:value-type="string">
            <text:p>Research Journal in Business and Economic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1057/s41599-024-03605-1</text:p>
          </table:table-cell>
          <table:table-cell office:value-type="string" calcext:value-type="string">
            <text:p>Internation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ho, E.</text:p>
          </table:table-cell>
          <table:table-cell office:value-type="string" calcext:value-type="string">
            <text:p>A qualitative investigation of financial decisionmaking and enabling factors among ethnic minority young adults in Hong Kong</text:p>
          </table:table-cell>
          <table:table-cell office:value-type="string" calcext:value-type="string">
            <text:p>Humanities and Social Sciences Communication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1016/j.actpsy.2025.105334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Dimauhanan, D.; Santiago, A.; Eusebio, M.; Loterina, S.; Ong, A.; Chavez, J.</text:p>
          </table:table-cell>
          <table:table-cell office:value-type="string" calcext:value-type="string">
            <text:p>Financial literacy and sustainable planning assessment among Filipino millennials</text:p>
          </table:table-cell>
          <table:table-cell office:value-type="string" calcext:value-type="string">
            <text:p>Acta Psychologica</text:p>
          </table:table-cell>
          <table:table-cell table:number-columns-repeated="3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3:33:35.906973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3:29:08.378629300</meta:creation-date>
    <dc:date>2026-05-04T15:28:30.457673500</dc:date>
    <meta:editing-duration>PT1H43M41S</meta:editing-duration>
    <meta:editing-cycles>9</meta:editing-cycles>
    <meta:generator>LibreOffice/25.8.5.2$Windows_X86_64 LibreOffice_project/9c8b85f387cc00a89945a79c9e6239f32e450ac2</meta:generator>
    <meta:document-statistic meta:table-count="1" meta:cell-count="153" meta:object-count="0"/>
  </office:meta>
</office:document-meta>
</file>