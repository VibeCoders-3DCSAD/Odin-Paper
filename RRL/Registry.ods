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76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02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NOT(ISERROR(SEARCH(&quot;Local&quot;;[.B2]))))" style:apply-style-name="cf3" style:base-cell-address="Sheet1.B2"/>
      <style:map style:condition="of:is-true-formula(NOT(ISERROR(SEARCH(&quot;International&quot;;[.B2]))))" style:apply-style-name="cf2" style:base-cell-address="Sheet1.B2"/>
      <style:map style:condition="of:is-true-formula(NOT(ISERROR(SEARCH(&quot;Algorithm-specific&quot;;[.B2]))))" style:apply-style-name="cf1" style:base-cell-address="Sheet1.B2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NOT(ISERROR(SEARCH(&quot;Local&quot;;[.B2]))))" style:apply-style-name="cf3" style:base-cell-address="Sheet1.B2"/>
      <style:map style:condition="of:is-true-formula(NOT(ISERROR(SEARCH(&quot;International&quot;;[.B2]))))" style:apply-style-name="cf2" style:base-cell-address="Sheet1.B2"/>
      <style:map style:condition="of:is-true-formula(NOT(ISERROR(SEARCH(&quot;Algorithm-specific&quot;;[.B2]))))" style:apply-style-name="cf1" style:base-cell-address="Sheet1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5" table:number-columns-repeated="16375" table:default-cell-style-name="ce1"/>
        <table:table-row table:style-name="ro1">
          <table:table-cell office:value-type="string" table:style-name="ce2">
            <text:p>Paper 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Authors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Venue</text:p>
          </table:table-cell>
          <table:table-cell office:value-type="string" table:style-name="ce2">
            <text:p>Topics</text:p>
          </table:table-cell>
          <table:table-cell office:value-type="string" table:style-name="ce2">
            <text:p>Tags</text:p>
          </table:table-cell>
          <table:table-cell office:value-type="string" table:style-name="ce2">
            <text:p>Notes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10.15662/IJARCST.2025.0805004</text:p>
          </table:table-cell>
          <table:table-cell office:value-type="string" table:style-name="ce5">
            <text:p>Algorithm-specific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Bhavana, B. R.; Pavan, D.; Guru Darshan, T. H.</text:p>
          </table:table-cell>
          <table:table-cell office:value-type="string" table:style-name="ce4">
            <text:p>AI-Based Wealth Advisory System using Machine Learning and Predictive Analytics for Personalized Budget Planning</text:p>
          </table:table-cell>
          <table:table-cell office:value-type="string" table:style-name="ce4">
            <text:p>International Journal of Advanced Research in Computer Science and Technology</text:p>
          </table:table-cell>
          <table:table-cell table:number-columns-repeated="3" table:style-name="ce4"/>
          <table:table-cell table:number-columns-repeated="16375"/>
        </table:table-row>
        <table:table-row table:style-name="ro3">
          <table:table-cell office:value-type="string" table:style-name="ce3">
            <text:p>f8c3de3d-1fea-4d7c-a8b0-29f63c4c3454</text:p>
          </table:table-cell>
          <table:table-cell office:value-type="string" table:style-name="ce6">
            <text:p>International</text:p>
          </table:table-cell>
          <table:table-cell office:value-type="float" office:value="2025" table:style-name="ce3">
            <text:p>2025</text:p>
          </table:table-cell>
          <table:table-cell office:value-type="string" table:style-name="ce3">
            <text:p>Akinyemi, A.</text:p>
          </table:table-cell>
          <table:table-cell office:value-type="string" table:style-name="ce3">
            <text:p>The Role of Financial Literacy in Reducing the Wealth Gap: The Effectiveness of Financial Coaching in Low-Income Communities (A Case Study of the US and Europe)</text:p>
          </table:table-cell>
          <table:table-cell office:value-type="string" table:style-name="ce3">
            <text:p>Contemporary Journal of Social Science Review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4">
            <text:p>10.55248/gengpi.6.0325.11142</text:p>
          </table:table-cell>
          <table:table-cell office:value-type="string" table:style-name="ce5">
            <text:p>Internation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Alvarina, C. C.; Handumon, H. O.; Peralta, J. M. B.; Paguia, M. A.; Alfanta, M. P.</text:p>
          </table:table-cell>
          <table:table-cell office:value-type="string" table:style-name="ce4">
            <text:p>Budgeting Practices Among Below Minimum Wage Earners: A Case Study of Sales Personnel of Local Enterprises in Pagadian City</text:p>
          </table:table-cell>
          <table:table-cell office:value-type="string" table:style-name="ce4">
            <text:p>International Journal of Research Publication and Reviews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1080/1369183X.2025.2542769</text:p>
          </table:table-cell>
          <table:table-cell office:value-type="string" table:style-name="ce5">
            <text:p>Internation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mrith, M.</text:p>
          </table:table-cell>
          <table:table-cell office:value-type="string" table:style-name="ce4">
            <text:p>Reimagining social protection: financialised futures among ageing migrant domestic workers in Asia</text:p>
          </table:table-cell>
          <table:table-cell office:value-type="string" table:style-name="ce4">
            <text:p>Journal of Ethnic and Migration Studie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3390/ijfs14020035</text:p>
          </table:table-cell>
          <table:table-cell office:value-type="string" table:style-name="ce5">
            <text:p>Internation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oun, D.; R., R.; Sfeir, L.; Al Maalouf, N. J.</text:p>
          </table:table-cell>
          <table:table-cell office:value-type="string" table:style-name="ce4">
            <text:p>Financial Literacy, FinTech Adoption, and Financial Attitudes: Shaping Economic Decision-Making among Millennials in Lebanon</text:p>
          </table:table-cell>
          <table:table-cell office:value-type="string" table:style-name="ce4">
            <text:p>International Journal of Financial Studies</text:p>
          </table:table-cell>
          <table:table-cell table:number-columns-repeated="3" table:style-name="ce4"/>
          <table:table-cell table:number-columns-repeated="16375"/>
        </table:table-row>
        <table:table-row table:style-name="ro5">
          <table:table-cell office:value-type="string" table:style-name="ce4">
            <text:p>10.55955/330001</text:p>
          </table:table-cell>
          <table:table-cell office:value-type="string" table:style-name="ce5">
            <text:p>Internation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Ataza, C.; Porcel, M.; Resabal, L.; Sandoval, A.; Bragas, C.</text:p>
          </table:table-cell>
          <table:table-cell office:value-type="string" table:style-name="ce4">
            <text:p>THE IMPACT OF PSYCHOLOGICAL, ECONOMIC, SOCIAL ASPECTS, AND INTEREST RATE VARIATIONS ON WORKING MILLENNIALS' SAVING PATTERNS THROUGH DIGITAL BANKING</text:p>
          </table:table-cell>
          <table:table-cell office:value-type="string" table:style-name="ce4">
            <text:p>Sacheta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1371/journal.pone.0294466</text:p>
          </table:table-cell>
          <table:table-cell office:value-type="string" table:style-name="ce5">
            <text:p>Internation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Bai, R.</text:p>
          </table:table-cell>
          <table:table-cell office:value-type="string" table:style-name="ce4">
            <text:p>Impact of Financial Literacy, Mental Budgeting, and Self-Control on Financial Well-Being with the Mediating Role of Investment Decision Making</text:p>
          </table:table-cell>
          <table:table-cell office:value-type="string" table:style-name="ce4">
            <text:p>PLoS ONE</text:p>
          </table:table-cell>
          <table:table-cell table:number-columns-repeated="3" table:style-name="ce4"/>
          <table:table-cell table:number-columns-repeated="16375"/>
        </table:table-row>
        <table:table-row table:style-name="ro3">
          <table:table-cell office:value-type="string" table:style-name="ce4">
            <text:p>10.5281/zenodo.15031111</text:p>
          </table:table-cell>
          <table:table-cell office:value-type="string" table:style-name="ce5">
            <text:p>Internation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lanog, V. C.; Paderan, M. J. D.; Adove, R. C. A.; Bathan, C. M. N.; Catibog, D. N.; Rivera, G. R.; Mangarin, J. A.</text:p>
          </table:table-cell>
          <table:table-cell office:value-type="string" table:style-name="ce4">
            <text:p>BUY NOW, PAY LATER: SHOPEE ONLINE STORE USERS EXPERIENCES ON SHOPEE PAY LATER FEATURE (SPAY LATER)</text:p>
          </table:table-cell>
          <table:table-cell office:value-type="string" table:style-name="ce4">
            <text:p>GUILD OF EDUCATORS IN TESOL INTERNATIONAL RESEARCH JOURNAL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a3b8c2d1-4e5f-4a8b-9c7d-6e5f4a3b2c1d</text:p>
          </table:table-cell>
          <table:table-cell office:value-type="string" table:style-name="ce5">
            <text:p>Internation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arpizo, E.; Balitar, J.; Balila, J.</text:p>
          </table:table-cell>
          <table:table-cell office:value-type="string" table:style-name="ce4">
            <text:p>The Impact of AUP-CES Livelihood Initiatives, Leadership and Management in Buklod Bahayan</text:p>
          </table:table-cell>
          <table:table-cell office:value-type="string" table:style-name="ce4">
            <text:p>11th ISC 2024 (Universitas Advent Indonesia, Indonesia)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1057/s41599-024-03605-1</text:p>
          </table:table-cell>
          <table:table-cell office:value-type="string" table:style-name="ce5">
            <text:p>Internation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ho, E.</text:p>
          </table:table-cell>
          <table:table-cell office:value-type="string" table:style-name="ce4">
            <text:p>A qualitative investigation of financial decisionmaking and enabling factors among ethnic minority young adults in Hong Kong</text:p>
          </table:table-cell>
          <table:table-cell office:value-type="string" table:style-name="ce4">
            <text:p>Humanities and Social Sciences Communications</text:p>
          </table:table-cell>
          <table:table-cell table:number-columns-repeated="3" table:style-name="ce4"/>
          <table:table-cell table:number-columns-repeated="16375"/>
        </table:table-row>
        <table:table-row table:style-name="ro6">
          <table:table-cell office:value-type="string" table:style-name="ce4">
            <text:p>10.1146/annurev-financial-110921-013217</text:p>
          </table:table-cell>
          <table:table-cell office:value-type="string" table:style-name="ce5">
            <text:p>Internation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D'Acunto, F.; Rossi, A. G.</text:p>
          </table:table-cell>
          <table:table-cell office:value-type="string" table:style-name="ce4">
            <text:p>Robo-Advice: Transforming Households into Rational Economic Agents</text:p>
          </table:table-cell>
          <table:table-cell office:value-type="string" table:style-name="ce4">
            <text:p>Annual Review of Financial Economics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f47ac10b-58cc-4372-a567-0e02b2c3d479</text:p>
          </table:table-cell>
          <table:table-cell office:value-type="string" table:style-name="ce5">
            <text:p>Internation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Ellyana, E.; Maricar, R.; Toalib, R.</text:p>
          </table:table-cell>
          <table:table-cell office:value-type="string" table:style-name="ce4">
            <text:p>A Systematic Literature Review on Personal Financial Management Practices: Budgeting, Investment, Debt, and Saving</text:p>
          </table:table-cell>
          <table:table-cell office:value-type="string" table:style-name="ce4">
            <text:p>World Journal of Economics, Business and Management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62986/dp2024.10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Albert, J. R. G.; Briones, R. M.; Rivera, J. P. R.</text:p>
          </table:table-cell>
          <table:table-cell office:value-type="string" table:style-name="ce4">
            <text:p>Wealth Creation for Expanding the Middle Class in the Philippines</text:p>
          </table:table-cell>
          <table:table-cell office:value-type="string" table:style-name="ce4">
            <text:p>Philippine Institute for Development Studies Discussion Paper Series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20944/preprints202508.0349.v1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Ama, N. A.</text:p>
          </table:table-cell>
          <table:table-cell office:value-type="string" table:style-name="ce4">
            <text:p>Analysis of the Food and Income Expenditure Survey 2023 Among Filipino Households</text:p>
          </table:table-cell>
          <table:table-cell office:value-type="string" table:style-name="ce4">
            <text:p>Preprints.org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style-name="ce4">
            <text:p>10.63498/ijabms2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mando, M. A. A.</text:p>
          </table:table-cell>
          <table:table-cell office:value-type="string" table:style-name="ce4">
            <text:p>The plight of teachers on the twice-a-month salary release: Financial literacy and survival</text:p>
          </table:table-cell>
          <table:table-cell office:value-type="string" table:style-name="ce4">
            <text:p>International Journal of Accountancy, Business, and Management Studies (IJABMS)</text:p>
          </table:table-cell>
          <table:table-cell table:number-columns-repeated="3" table:style-name="ce4"/>
          <table:table-cell table:number-columns-repeated="16375"/>
        </table:table-row>
        <table:table-row table:style-name="ro4">
          <table:table-cell office:value-type="string" table:style-name="ce4">
            <text:p>10.69569/ijp.2026.065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Am-una, A.</text:p>
          </table:table-cell>
          <table:table-cell office:value-type="string" table:style-name="ce4">
            <text:p>Beyond Awareness: Examining Financial Behaviors Among Public School Teachers in the Philippines</text:p>
          </table:table-cell>
          <table:table-cell office:value-type="string" table:style-name="ce4">
            <text:p>Journal of Interdisciplinary Perspectiv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35877/454RI.daengku4034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Apao, A. A.; Cayanpat, R. A. B.; Edullantes, Y. P. Jr.; Cabanero, K. E. S.; Hechanova, J. M. T.; Candia, H. G.</text:p>
          </table:table-cell>
          <table:table-cell office:value-type="string" table:style-name="ce4">
            <text:p>Martime Students' Financial Knowledge, Attitude, and Behavior</text:p>
          </table:table-cell>
          <table:table-cell office:value-type="string" table:style-name="ce4">
            <text:p>Daengku: Journal of Humanities and Social Sciences Innovation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10.35974/isc.v11i4.3599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Asi, G. M.; Anaya, K. O.; Piquero, J. R. M.; Romero, C. J. P.; Sales, Y. L. M.; Suñga, P. A. N.; Ibañez, M. M.; Ramos, R. I. A.</text:p>
          </table:table-cell>
          <table:table-cell office:value-type="string" table:style-name="ce4">
            <text:p>Peer Influence and Adolescent Spending: Insights into High School Students' Buying Behavior</text:p>
          </table:table-cell>
          <table:table-cell office:value-type="string" table:style-name="ce4">
            <text:p>11th International Scholar's Conference (ISC 2024), Universitas Advent Indonesia, Indonesia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f7d9e3a2-5b1c-4e8a-9d2f-6b4e8c7a3d1f</text:p>
          </table:table-cell>
          <table:table-cell office:value-type="string" table:style-name="ce5">
            <text:p>Local</text:p>
          </table:table-cell>
          <table:table-cell office:value-type="float" office:value="2021" table:style-name="ce4">
            <text:p>2021</text:p>
          </table:table-cell>
          <table:table-cell office:value-type="string" table:style-name="ce4">
            <text:p>Bangko Sentral ng Pilipinas</text:p>
          </table:table-cell>
          <table:table-cell office:value-type="string" table:style-name="ce4">
            <text:p>2021 Consumer Finance Survey (CFS)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Bangko Sentral ng Pilipinas</text:p>
          </table:table-cell>
          <table:table-cell office:value-type="string" table:style-name="ce4">
            <text:p>Consumer Confidence Improves in Q1 2026, Less Upbeat for the Year Ahead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1016/j.latcb.2025.100196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Bayangos, V. B.; Lubangco, C. K.</text:p>
          </table:table-cell>
          <table:table-cell office:value-type="string" table:style-name="ce4">
            <text:p>Do Remittances Boost Household Spending: New Evidence from Migrants' Household Survey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2139/ssrn.5678282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Bongado, B. B.; Magallanes, A. R.; Semana, C. M.</text:p>
          </table:table-cell>
          <table:table-cell office:value-type="string" table:style-name="ce4">
            <text:p>INFLUENCE OF DIGITAL WALLETS ON THE FINANCIAL BEHAVIOR OF HEIS STUDENTS</text:p>
          </table:table-cell>
          <table:table-cell office:value-type="string" table:style-name="ce4">
            <text:p>SSRN Electronic Journal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10.11594/ijmaber.05.08.32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Bongalonta, M. B.; Bongalonta, M. M.; Gigantoca, S. E.</text:p>
          </table:table-cell>
          <table:table-cell office:value-type="string" table:style-name="ce4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table:style-name="ce4">
            <text:p>International Journal of Multidisciplinary Applied Business and Education Research (IJMABER)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53f2d4a7-1b3c-4e8e-9a2d-6c3b8e4f7a1d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biles, S. L.</text:p>
          </table:table-cell>
          <table:table-cell office:value-type="string" table:style-name="ce4">
            <text:p>Financial Management Practices of Employees at Bureau Of Internal Revenue</text:p>
          </table:table-cell>
          <table:table-cell office:value-type="string" table:style-name="ce4">
            <text:p>United International Journal for Research &amp; Technology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8c3e5a2-7b1d-4e9c-8a3f-2d6e9b1c4a7d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acnio, F. Q.; Romarate, M. E. G.</text:p>
          </table:table-cell>
          <table:table-cell office:value-type="string" table:style-name="ce4">
            <text:p>How does financial literacy affect financial behavior over the life cycle? Evidence from Filipino households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10.55248/geneqi.6.0525.1716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salhay, S. F.; Guevarra, C. M.; Bragas, C. M.</text:p>
          </table:table-cell>
          <table:table-cell office:value-type="string" table:style-name="ce4">
            <text:p>The Gig Economy: Financial Challenges and Opportunities Faced by Freelancers</text:p>
          </table:table-cell>
          <table:table-cell office:value-type="string" table:style-name="ce4">
            <text:p>International Journal of Research Publication and Review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46303/tpied.2024.12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Casilan, J. J.; Baclagan, T.</text:p>
          </table:table-cell>
          <table:table-cell office:value-type="string" table:style-name="ce4">
            <text:p>Exploring Parental Expectations on Children Helping Parents out in Lower Middle-Income Families</text:p>
          </table:table-cell>
          <table:table-cell office:value-type="string" table:style-name="ce4">
            <text:p>Theory and Practice in Child Development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10.58557/(ijeh).v5i2.311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asino, R. M. Z.; Serrano, L. L.; Granada, M. I. D.</text:p>
          </table:table-cell>
          <table:table-cell office:value-type="string" table:style-name="ce4">
            <text:p>Revisiting the Filipino Value Utang na Loob: Contextual Perceptions, Implications and Inputs to Sustaining the Filipino Psychology Discussions</text:p>
          </table:table-cell>
          <table:table-cell office:value-type="string" table:style-name="ce4">
            <text:p>International Journal of Education and Humanitie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10.61424/rjbe.v3i3.569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Cervantes, J. Z.; Custora, J. M. G.; Duguran, J. C. C.; Malacaya, A. S.; Mendoza, J.; Panga, R. B.; Waminal, E. D.</text:p>
          </table:table-cell>
          <table:table-cell office:value-type="string" table:style-name="ce4">
            <text:p>The Effect of Online Buying Decision on Personal Budget of Business Administration Students</text:p>
          </table:table-cell>
          <table:table-cell office:value-type="string" table:style-name="ce4">
            <text:p>Research Journal in Business and Economic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Co, M.; Centeno, D.</text:p>
          </table:table-cell>
          <table:table-cell office:value-type="string" table:style-name="ce4">
            <text:p>Effects of Filipino Consumers' Financial Attitudes, Subjective Norms, and Perceived Behavioral Control on Intentions to Formal Banking: Towards Financial Inclusion</text:p>
          </table:table-cell>
          <table:table-cell office:value-type="string" table:style-name="ce4">
            <text:p>Philippine Management Review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D, Althea Grace; R, Valerie Mae; G, Lazaro Bryan Louis</text:p>
          </table:table-cell>
          <table:table-cell office:value-type="string" table:style-name="ce4">
            <text:p>Navigating Financial Struggle: The Ripple Effect of Inflation Rates on Working Students</text:p>
          </table:table-cell>
          <table:table-cell office:value-type="string" table:style-name="ce4">
            <text:p>International Journal of Advanced Multidisciplinary Research and Studie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10.61424/rjbe.v3.i3.574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Dela Torre, J. M. Y.; Jangao, J. P. P.; Maghilum, J. T.; Man-onan, R. J. H.; Pepito, S. G. Jr.; Rapirap, G. P. Jr.; Cervantes, J. Z.</text:p>
          </table:table-cell>
          <table:table-cell office:value-type="string" table:style-name="ce4">
            <text:p>The Impact of Personal Budgeting Skills on College Students' Financial Stability</text:p>
          </table:table-cell>
          <table:table-cell office:value-type="string" table:style-name="ce4">
            <text:p>Research Journal in Business and Economics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1016/j.actpsy.2025.105334</text:p>
          </table:table-cell>
          <table:table-cell office:value-type="string" table:style-name="ce5">
            <text:p>Local</text:p>
          </table:table-cell>
          <table:table-cell office:value-type="float" office:value="2025" table:style-name="ce4">
            <text:p>2025</text:p>
          </table:table-cell>
          <table:table-cell office:value-type="string" table:style-name="ce4">
            <text:p>Dimauhanan, D.; Santiago, A.; Eusebio, M.; Loterina, S.; Ong, A.; Chavez, J.</text:p>
          </table:table-cell>
          <table:table-cell office:value-type="string" table:style-name="ce4">
            <text:p>Financial literacy and sustainable planning assessment among Filipino millennials</text:p>
          </table:table-cell>
          <table:table-cell office:value-type="string" table:style-name="ce4">
            <text:p>Acta Psychologica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10.3389/fsoe.2026.1752009</text:p>
          </table:table-cell>
          <table:table-cell office:value-type="string" table:style-name="ce5">
            <text:p>Local</text:p>
          </table:table-cell>
          <table:table-cell office:value-type="float" office:value="2026" table:style-name="ce4">
            <text:p>2026</text:p>
          </table:table-cell>
          <table:table-cell office:value-type="string" table:style-name="ce4">
            <text:p>Domingo, P.</text:p>
          </table:table-cell>
          <table:table-cell office:value-type="string" table:style-name="ce4">
            <text:p>Family dynamics in Filipino transnational families: the role of non-migrant mothers</text:p>
          </table:table-cell>
          <table:table-cell office:value-type="string" table:style-name="ce4">
            <text:p>Frontiers in Sociology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10.55927/fjss.v2i3.4572</text:p>
          </table:table-cell>
          <table:table-cell office:value-type="string" table:style-name="ce5">
            <text:p>Local</text:p>
          </table:table-cell>
          <table:table-cell office:value-type="float" office:value="2023" table:style-name="ce4">
            <text:p>2023</text:p>
          </table:table-cell>
          <table:table-cell office:value-type="string" table:style-name="ce4">
            <text:p>Donato, A. M.; Panotan, G. V.; Castro, J. M.; Gavino, R. M.</text:p>
          </table:table-cell>
          <table:table-cell office:value-type="string" table:style-name="ce4">
            <text:p>The Concept of Utang Na Loob Among Filipino Working Millennials</text:p>
          </table:table-cell>
          <table:table-cell office:value-type="string" table:style-name="ce4">
            <text:p>Jormosa Journal of Social Sciences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f47ac10b-58cc-4372-a567-0e02b2c3d479</text:p>
          </table:table-cell>
          <table:table-cell office:value-type="string" table:style-name="ce5">
            <text:p>Local</text:p>
          </table:table-cell>
          <table:table-cell office:value-type="float" office:value="2024" table:style-name="ce4">
            <text:p>2024</text:p>
          </table:table-cell>
          <table:table-cell office:value-type="string" table:style-name="ce4">
            <text:p>Mesina-Romero, B.; Masangkay, M. C.; Franco, M.; Yambao, M. A. V.; Delgado, K.; Bueno, P. N.; Lingat, P. J.; Natividad, G. M.; Lapus, A. R.; Manuel, R. M.; Yñigo, K. T.</text:p>
          </table:table-cell>
          <table:table-cell office:value-type="string" table:style-name="ce4">
            <text:p>2024 Report on the Status of Digital Payments in the Philippines</text:p>
          </table:table-cell>
          <table:table-cell office:value-type="string" table:style-name="ce4">
            <text:p>Bangko Sentral ng Pilipinas</text:p>
          </table:table-cell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Sheet1.A1:Sheet1.I37" table:name="Table1" table:display-filter-buttons="true">
          <table:sort>
            <table:sort-by table:field-number="1"/>
          </table:sort>
        </table:database-range>
        <table:database-range table:target-range-address="Sheet1.A2:Sheet1.I36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DDEBF7"/>
    </style:style>
    <style:style style:name="cf2" style:family="table-cell">
      <style:table-cell-properties fo:background-color="#E2EFDA"/>
    </style:style>
    <style:style style:name="cf3" style:family="table-cell">
      <style:table-cell-properties fo:background-color="#FFF2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uevarra</dc:creator>
    <meta:creation-date>2026-05-01T13:29:08Z</meta:creation-date>
    <dc:date>2026-05-06T02:51:49Z</dc:date>
    <meta:editing-cycles>16</meta:editing-cycles>
    <meta:editing-duration>PT30307S</meta:editing-duration>
  </office:meta>
</office:document-meta>
</file>